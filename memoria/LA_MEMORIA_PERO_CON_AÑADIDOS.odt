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176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 style:family="table">
      <style:table-properties style:width="0.169cm" fo:margin-left="0.039cm" fo:margin-right="16.792cm" table:align="margins"/>
    </style:style>
    <style:style style:name="Tabla1.A" style:family="table-column">
      <style:table-column-properties style:column-width="0.083cm" style:rel-column-width="32084*"/>
    </style:style>
    <style:style style:name="Tabla1.B" style:family="table-column">
      <style:table-column-properties style:column-width="0.086cm" style:rel-column-width="3345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00" style:font-size-asian="60pt" style:font-size-complex="60pt"/>
    </style:style>
    <style:style style:name="P22" style:family="paragraph" style:parent-style-name="Standard">
      <style:paragraph-properties fo:margin-left="0cm" fo:margin-right="0cm" fo:text-indent="0cm" style:auto-text-indent="false" fo:background-color="#1c1c1c">
        <style:background-image/>
      </style:paragraph-properties>
      <style:text-properties fo:background-color="#ffff00"/>
    </style:style>
    <style:style style:name="P23" style:family="paragraph" style:parent-style-name="Standard">
      <style:paragraph-properties fo:margin-left="0cm" fo:margin-right="0cm" fo:text-indent="0cm" style:auto-text-indent="false" fo:background-color="#1c1c1c">
        <style:background-image/>
      </style:paragraph-properties>
      <style:text-properties fo:background-color="#ffffff"/>
    </style:style>
    <style:style style:name="P24" style:family="paragraph" style:parent-style-name="Standard">
      <style:paragraph-properties fo:margin-left="0cm" fo:margin-right="0cm" fo:text-indent="0cm" style:auto-text-indent="false" fo:background-color="#99ffff">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5"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6"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7"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ccff00" style:font-size-asian="20pt" style:font-size-complex="20pt"/>
    </style:style>
    <style:style style:name="P2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ccff00" style:font-size-asian="20pt" style:font-size-complex="20pt"/>
    </style:style>
    <style:style style:name="P29" style:family="paragraph" style:parent-style-name="Standard" style:list-style-name="L1">
      <style:paragraph-properties fo:margin-left="0cm" fo:margin-right="0cm" fo:text-indent="0cm" style:auto-text-indent="false" fo:background-color="#1c1c1c">
        <style:background-image/>
      </style:paragraph-properties>
    </style:style>
    <style:style style:name="P30" style:family="paragraph" style:parent-style-name="Standard" style:list-style-name="L1">
      <style:paragraph-properties fo:margin-left="0cm" fo:margin-right="0cm" fo:text-indent="0cm" style:auto-text-indent="false" fo:background-color="#1c1c1c">
        <style:background-image/>
      </style:paragraph-properties>
      <style:text-properties fo:background-color="#ffff00"/>
    </style:style>
    <style:style style:name="P31" style:family="paragraph" style:parent-style-name="Standard">
      <style:paragraph-properties fo:margin-left="0cm" fo:margin-right="0cm" fo:text-indent="0cm" style:auto-text-indent="false" fo:background-color="#66ffff">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32" style:family="paragraph" style:parent-style-name="Standard">
      <style:paragraph-properties fo:margin-left="0cm" fo:margin-right="0cm" fo:text-indent="0cm" style:auto-text-indent="false" fo:background-color="#66ffff">
        <style:background-image/>
      </style:paragraph-properties>
      <style:text-properties fo:color="#000000" fo:font-size="20pt" style:text-underline-style="solid" style:text-underline-width="auto" style:text-underline-color="font-color" fo:background-color="#ccff00" style:font-size-asian="20pt" style:font-size-complex="20pt"/>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color="#000000" fo:font-size="20pt" style:text-underline-style="solid" style:text-underline-width="auto" style:text-underline-color="font-color" fo:background-color="#ffffff" style:font-size-asian="20pt" style:font-size-complex="20pt"/>
    </style:style>
    <style:style style:name="T7" style:family="text">
      <style:text-properties fo:color="#000000" fo:font-size="20pt" fo:background-color="#ffffff" style:font-size-asian="20pt" style:font-size-complex="20pt"/>
    </style:style>
    <style:style style:name="T8" style:family="text">
      <style:text-properties fo:background-color="#ffffff"/>
    </style:style>
    <style:style style:name="T9" style:family="text">
      <style:text-properties fo:font-size="20pt" fo:background-color="#ffffff" style:font-size-asian="20pt" style:font-size-complex="20pt"/>
    </style:style>
    <style:style style:name="T10"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8">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newAdmin <text:s/>|| <text:s/>contraseña: 123</text:p>
      <text:p text:style-name="P11"><text:s text:c="6"/>. Usuario || nombre : juanjo16 <text:s/>|| <text:s/>contraseña: pro_Me---notYou</text:p>
      <text:p text:style-name="P11"><text:s text:c="6"/>. Usuario || nombre : asdfg <text:s/>|| <text:s/>contraseña: asdfg</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21">NUEVO</text:p>
      <text:p text:style-name="P10"/>
      <text:list xml:id="list6584353582567314578" text:style-name="L1">
        <text:list-header>
          <text:p text:style-name="P25">Linkdln añadido.</text:p>
        </text:list-header>
      </text:list>
      <text:p text:style-name="P18"/>
      <text:p text:style-name="P19">Linkdln muy muy muy muy muy muy muy muy muy muy mu muy muy muy muy muy muy muy muy muy muy <text:s/>muy muy muy muy muy muy muy muy muy muy muy muy muy muy muy currado.</text:p>
      <text:list xml:id="list31735159" text:continue-numbering="true" text:style-name="L1">
        <text:list-header>
          <text:p text:style-name="P25"/>
          <text:p text:style-name="P25">Git mejorado (se añadieron pages y readme.md a todos los <text:s/>projectos visibles [o al menos creo que son los únicos visibles]):</text:p>
        </text:list-header>
        <text:list-item>
          <text:p text:style-name="P26"/>
          <text:p text:style-name="P29"><text:span text:style-name="T6">- <text:s text:c="4"/>page del projecto: </text:span><text:a xlink:type="simple" xlink:href="https://xdfrstw.github.io/projecto-full-stack-2026.github.io/" text:style-name="Internet_20_link" text:visited-style-name="Visited_20_Internet_20_Link"><text:span text:style-name="T7">https://xdfrstw.github.io/projecto-full-stack-2026.github.io/</text:span></text:a></text:p>
        </text:list-item>
      </text:list>
      <text:p text:style-name="P22"/>
      <text:list xml:id="list31716468" text:continue-numbering="true" text:style-name="L1">
        <text:list-header>
          <text:p text:style-name="P29"><text:span text:style-name="T6">- <text:s text:c="4"/>page de thonny python: </text:span><text:a xlink:type="simple" xlink:href="http://XDFRSTW.github.io/" text:style-name="Internet_20_link" text:visited-style-name="Visited_20_Internet_20_Link"><text:span text:style-name="T9">http://XDFRSTW.github.io/</text:span></text:a></text:p>
          <text:p text:style-name="P30"/>
          <text:p text:style-name="P29"><text:span text:style-name="T6">- <text:s text:c="4"/>page de visual: </text:span><text:a xlink:type="simple" xlink:href="https://xdfrstw.github.io/visual/" text:style-name="Internet_20_link" text:visited-style-name="Visited_20_Internet_20_Link"><text:span text:style-name="T9">https://xdfrstw.github.io/visual/</text:span></text:a></text:p>
          <text:p text:style-name="P26"/>
          <text:p text:style-name="P25">Intento de añadir kebab case a todos los componentes <text:span text:style-name="T10">lógicos.</text:span></text:p>
        </text:list-header>
      </text:list>
      <text:p text:style-name="P19"/>
      <text:p text:style-name="P18">Una de las variables del backend a pasado a ser un boolean.</text:p>
      <text:p text:style-name="P18"/>
      <text:p text:style-name="P18">Se ha añadido al backend datos del tipo number (que supongongo son int), aunque no se usan.</text:p>
      <text:p text:style-name="P20"/>
      <text:p text:style-name="P28"><text:soft-page-break/>Han sido solucionados todos los fallos surgidos en la mejora del proyecto.</text:p>
      <text:p text:style-name="P20"/>
      <text:p text:style-name="P28">Errores en vercel solucionados.</text:p>
      <text:p text:style-name="P20"/>
      <text:p text:style-name="P18">Archivo .gitignore más complejo.</text:p>
      <text:p text:style-name="P19"/>
      <text:p text:style-name="P18">Ha sido añadida una carpeta "pages".</text:p>
      <text:p text:style-name="P18"/>
      <text:p text:style-name="P27">Se han añadido componentes "reales" [Aunque técnicamente las constantes casi que contarían como componentes, o algo por el estilo].</text:p>
      <text:p text:style-name="P18"/>
      <text:p text:style-name="P18">Se ha añadido algún que otro prop en la página "admin" y "perfil".</text:p>
      <text:p text:style-name="P18"/>
      <text:p text:style-name="P18">Metidas todas las constantes que he podido en una misma carpeta.</text:p>
      <text:p text:style-name="P19"/>
      <text:p text:style-name="P27">La mayoría de las constantes de la carpeta "const" están integradas en el código y funcionan.</text:p>
      <text:p text:style-name="P19"/>
      <text:p text:style-name="P18">Se ha aplicado "Winston" en vez de "console" en el backend.</text:p>
      <text:p text:style-name="P19"/>
      <text:p text:style-name="P19">Se ha aplicado "Winston" en vez de "console" en el fronted.</text:p>
      <text:p text:style-name="P19"/>
      <table:table table:name="Tabla2" table:style-name="Tabla2">
        <table:table-column table:style-name="Tabla2.A"/>
        <table:table-row>
          <table:table-cell table:style-name="Tabla2.A1" office:value-type="string">
            <text:p text:style-name="P24">Amarillo ---&gt; No se ha podido realizar.</text:p>
          </table:table-cell>
        </table:table-row>
      </table:table>
      <text:p text:style-name="P19"/>
      <table:table table:name="Tabla3" table:style-name="Tabla3">
        <table:table-column table:style-name="Tabla3.A"/>
        <table:table-row>
          <table:table-cell table:style-name="Tabla3.A1" office:value-type="string">
            <text:p text:style-name="P31">Blanco ---&gt; Hecho.</text:p>
            <text:p text:style-name="P32"><text:soft-page-break/>Verde ---&gt; Ignorar.</text:p>
          </table:table-cell>
        </table:table-row>
      </table:table>
      <text:p text:style-name="P23"/>
      <table:table table:name="Tabla1" table:style-name="Tabla1">
        <table:table-column table:style-name="Tabla1.A"/>
        <table:table-column table:style-name="Tabla1.B"/>
        <table:table-header-rows>
          <table:table-row>
            <table:table-cell table:style-name="Tabla1.A1" office:value-type="string">
              <text:p text:style-name="Table_20_Contents"/>
              <text:p text:style-name="Table_20_Contents">||</text:p>
            </table:table-cell>
            <table:table-cell table:style-name="Tabla1.B1" office:value-type="string">
              <text:p text:style-name="Table_20_Contents">I</text:p>
            </table:table-cell>
          </table:table-row>
        </table:table-header-rows>
      </table:table>
      <text:p text:style-name="P6"/>
      <text:p text:style-name="P10"/>
      <text:p text:style-name="P10">BACKEND y FRONTED</text:p>
      <text:p text:style-name="P10"/>
      <text:p text:style-name="P11">Creado con express y node, cuenta con tres rutas: Usuario, Producto y Carrito.</text:p>
      <text:p text:style-name="P11">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text:soft-page-break/>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
      <text:p text:style-name="P1">Esta es la página inicial que se muestra al usuario, con las opciones de iniciar sesión y registrarse. Al registrarse se muestra por pantalla un mensaje que te dirá si existe o no el usuario, y si se ha creado. El mayor error que puede ocurrir en la página es el duplicado de usuario, pero para ello están los admins para solucionarlo (no se con 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soft-page-break/></text:p>
      <text:p text:style-name="P1"/>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soft-page-break/></text:p>
      <text:p text:style-name="P1"/>
      <text:p text:style-name="P1">En la página de tu perfil, podrás editar tu imagen de perfil (solo visibles para el administrador), además de crear productos, cerrar sesión y eliminar tu usuario.</text:p>
      <text:p text:style-name="P1">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soft-page-break/></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p>
      <text:p text:style-name="P1"/>
      <text:p text:style-name="P1"/>
      <text:p text:style-name="P1"/>
      <text:p text:style-name="P1"/>
      <text:p text:style-name="P1"/>
      <text:p text:style-name="P1"/>
      <text:p text:style-name="P1"/>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soft-page-break/></text:p>
      <text:p text:style-name="P1"/>
      <text:p text:style-name="P1"/>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soft-page-break/></text:p>
      <text:p text:style-name="P1"/>
      <text:p text:style-name="P1"/>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soft-page-break/></text:p>
      <text:p text:style-name="P1"/>
      <text:p text:style-name="P1"/>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
      <text:p text:style-name="P1"><text:soft-page-break/></text:p>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43M2S</meta:editing-duration>
    <meta:editing-cycles>38</meta:editing-cycles>
    <meta:generator>OpenOffice/4.1.6$Win32 OpenOffice.org_project/416m1$Build-9790</meta:generator>
    <dc:date>2026-06-22T11:45:10.77</dc:date>
    <meta:document-statistic meta:table-count="3" meta:image-count="10" meta:object-count="0" meta:page-count="12" meta:paragraph-count="68" meta:word-count="1355" meta:character-count="7989"/>
    <meta:user-defined meta:name="Info 1"/>
    <meta:user-defined meta:name="Info 2"/>
    <meta:user-defined meta:name="Info 3"/>
    <meta:user-defined meta:name="Info 4"/>
  </office:meta>
</office:document-meta>
</file>