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Birch Std" svg:font-family="'Birch Std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</style:style>
    <style:style style:name="P2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font-size="24pt" style:font-size-asian="24pt" style:font-size-complex="24pt"/>
    </style:style>
    <style:style style:name="P3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00cc" style:font-name="Birch Std" fo:font-size="14pt" style:text-underline-style="none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66ffff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ffffff" fo:font-size="14pt" style:text-underline-style="none" style:font-size-asian="14pt" style:font-size-complex="14pt"/>
    </style:style>
    <style:style style:name="T2" style:family="text">
      <style:text-properties fo:color="#66ffff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66ffff"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1"><text:span text:style-name="T1">Url <text:s/>:</text:span><text:span text:style-name="T3"> </text:span><text:a xlink:type="simple" xlink:href="https://1-2015yraub-santimyxe-7759s-projects.vercel.app/" text:style-name="Internet_20_link" text:visited-style-name="Visited_20_Internet_20_Link"><text:span text:style-name="T2">Express</text:span></text:a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Birch Std" svg:font-family="'Birch Std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000000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3M56S</meta:editing-duration>
    <meta:editing-cycles>13</meta:editing-cycles>
    <meta:generator>OpenOffice/4.1.6$Win32 OpenOffice.org_project/416m1$Build-9790</meta:generator>
    <dc:date>2026-04-23T07:49:31.48</dc:date>
    <meta:document-statistic meta:table-count="0" meta:image-count="0" meta:object-count="0" meta:page-count="1" meta:paragraph-count="1" meta:word-count="3" meta:character-count="14"/>
    <meta:user-defined meta:name="Info 1"/>
    <meta:user-defined meta:name="Info 2"/>
    <meta:user-defined meta:name="Info 3"/>
    <meta:user-defined meta:name="Info 4"/>
  </office:meta>
</office:document-meta>
</file>